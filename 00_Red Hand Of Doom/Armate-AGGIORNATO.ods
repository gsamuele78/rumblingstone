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office:version="1.2">
  <office:automatic-styles>
    <style:style style:name="ce1" style:family="table-cell">
      <style:text-properties fo:font-weight="bold"/>
    </style:style>
    <style:style style:name="ce2" style:family="table-cell">
      <style:text-properties fo:font-weight="bold" fo:font-size="12pt"/>
    </style:style>
  </office:automatic-styles>
  <office:body>
    <office:spreadsheet>
      <table:table table:name="Riepilogo">
        <table:table-row>
          <table:table-cell table:style-name="ce2" office:value-type="string">
            <text:p>ORDA MANO ROSSA — RIEPILOGO FORZA INIZIALE</text:p>
          </table:table-cell>
          <table:table-cell/>
          <table:table-cell/>
          <table:table-cell/>
        </table:table-row>
        <table:table-row>
          <table:table-cell table:style-name="ce2" office:value-type="string">
            <text:p>Campagna RumblingStone | Livello 8 partenza | D&amp;D 3.5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Categoria</text:p>
          </table:table-cell>
          <table:table-cell table:style-name="ce2" office:value-type="string">
            <text:p># Iniziali</text:p>
          </table:table-cell>
          <table:table-cell table:style-name="ce2" office:value-type="string">
            <text:p>Note</text:p>
          </table:table-cell>
          <table:table-cell/>
        </table:table-row>
        <table:table-row>
          <table:table-cell office:value-type="string">
            <text:p>Forze Nucleari Hobgoblin</text:p>
          </table:table-cell>
          <table:table-cell office:value-type="float" office:value="2880">
            <text:p>2.880</text:p>
          </table:table-cell>
          <table:table-cell office:value-type="string">
            <text:p>Guerrieri, Élite, Arcieri, Sergenti</text:p>
          </table:table-cell>
          <table:table-cell/>
        </table:table-row>
        <table:table-row>
          <table:table-cell office:value-type="string">
            <text:p>Ausiliari Gobblinoidi</text:p>
          </table:table-cell>
          <table:table-cell office:value-type="float" office:value="1200">
            <text:p>1.200</text:p>
          </table:table-cell>
          <table:table-cell office:value-type="string">
            <text:p>Bugbear, Goblin, Wolf Rider, Orchi</text:p>
          </table:table-cell>
          <table:table-cell/>
        </table:table-row>
        <table:table-row>
          <table:table-cell office:value-type="string">
            <text:p>Creature Pesanti</text:p>
          </table:table-cell>
          <table:table-cell office:value-type="float" office:value="117">
            <text:p>117</text:p>
          </table:table-cell>
          <table:table-cell office:value-type="string">
            <text:p>Ogre, Giganti, Troll, Ettin</text:p>
          </table:table-cell>
          <table:table-cell/>
        </table:table-row>
        <table:table-row>
          <table:table-cell office:value-type="string">
            <text:p>Creature Volanti</text:p>
          </table:table-cell>
          <table:table-cell office:value-type="float" office:value="105">
            <text:p>105</text:p>
          </table:table-cell>
          <table:table-cell office:value-type="string">
            <text:p>Wyvern, Manticore, Barghest, Lupi Terribili</text:p>
          </table:table-cell>
          <table:table-cell/>
        </table:table-row>
        <table:table-row>
          <table:table-cell office:value-type="string">
            <text:p>Supporto Magico</text:p>
          </table:table-cell>
          <table:table-cell office:value-type="float" office:value="39">
            <text:p>39</text:p>
          </table:table-cell>
          <table:table-cell office:value-type="string">
            <text:p>War Adept, Warpriest, Sciamano Draconico</text:p>
          </table:table-cell>
          <table:table-cell/>
        </table:table-row>
        <table:table-row>
          <table:table-cell office:value-type="string">
            <text:p>Drow (fazione Sonjak)</text:p>
          </table:table-cell>
          <table:table-cell office:value-type="float" office:value="305">
            <text:p>305</text:p>
          </table:table-cell>
          <table:table-cell office:value-type="string">
            <text:p>Élite, Chierici/Maghi, Drider</text:p>
          </table:table-cell>
          <table:table-cell/>
        </table:table-row>
        <table:table-row>
          <table:table-cell office:value-type="string">
            <text:p>Githyanki</text:p>
          </table:table-cell>
          <table:table-cell office:value-type="float" office:value="375">
            <text:p>375</text:p>
          </table:table-cell>
          <table:table-cell office:value-type="string">
            <text:p>Cavalieri, Guerrieri, Psion</text:p>
          </table:table-cell>
          <table:table-cell/>
        </table:table-row>
        <table:table-row>
          <table:table-cell office:value-type="string">
            <text:p>Loxo da Guerra (schiavi)</text:p>
          </table:table-cell>
          <table:table-cell office:value-type="float" office:value="40">
            <text:p>40</text:p>
          </table:table-cell>
          <table:table-cell office:value-type="string">
            <text:p>Elefanti da guerra; possibile rivolta</text:p>
          </table:table-cell>
          <table:table-cell/>
        </table:table-row>
        <table:table-row>
          <table:table-cell office:value-type="string">
            <text:p>Centauri (schiavi)</text:p>
          </table:table-cell>
          <table:table-cell office:value-type="float" office:value="400">
            <text:p>400</text:p>
          </table:table-cell>
          <table:table-cell office:value-type="string">
            <text:p>Cavalieri; rallentano marcia; possibile rivolta</text:p>
          </table:table-cell>
          <table:table-cell/>
        </table:table-row>
        <table:table-row>
          <table:table-cell office:value-type="string">
            <text:p>Gnoll (mercenari)</text:p>
          </table:table-cell>
          <table:table-cell office:value-type="float" office:value="700">
            <text:p>700</text:p>
          </table:table-cell>
          <table:table-cell office:value-type="string">
            <text:p>Guerrieri, Pack Lord, Sciamani</text:p>
          </table:table-cell>
          <table:table-cell/>
        </table:table-row>
        <table:table-row>
          <table:table-cell table:style-name="ce2" office:value-type="string">
            <text:p>TOTALE INIZIALE</text:p>
          </table:table-cell>
          <table:table-cell table:style-name="ce2" office:value-type="string">
            <text:p>6.161</text:p>
          </table:table-cell>
          <table:table-cell table:style-name="ce2" office:value-type="string">
            <text:p>Prima dei distaccamenti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DISTACCAMENTI</text:p>
          </table:table-cell>
          <table:table-cell table:style-name="ce2" office:value-type="string">
            <text:p># Inviato</text:p>
          </table:table-cell>
          <table:table-cell table:style-name="ce2" office:value-type="string">
            <text:p>Perdite</text:p>
          </table:table-cell>
          <table:table-cell table:style-name="ce2" office:value-type="string">
            <text:p>Rientrano</text:p>
          </table:table-cell>
        </table:table-row>
        <table:table-row>
          <table:table-cell office:value-type="string">
            <text:p>Distaccamento Hammerfist (battaglia già avvenuta)</text:p>
          </table:table-cell>
          <table:table-cell office:value-type="float" office:value="793">
            <text:p>793</text:p>
          </table:table-cell>
          <table:table-cell office:value-type="float" office:value="306">
            <text:p>306</text:p>
          </table:table-cell>
          <table:table-cell office:value-type="float" office:value="486">
            <text:p>486</text:p>
          </table:table-cell>
        </table:table-row>
        <table:table-row>
          <table:table-cell office:value-type="string">
            <text:p>Distaccamento Dauth (Githyanki + supporto)</text:p>
          </table:table-cell>
          <table:table-cell office:value-type="float" office:value="575">
            <text:p>575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</table:table-row>
        <table:table-row>
          <table:table-cell table:style-name="ce2" office:value-type="string">
            <text:p>Corpo Principale (marcia Rethmar)</text:p>
          </table:table-cell>
          <table:table-cell table:style-name="ce2" office:value-type="string">
            <text:p>4.793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—</text:p>
          </table:table-cell>
        </table:table-row>
        <table:table-row>
          <table:table-cell/>
        </table:table-row>
        <table:table-row>
          <table:table-cell table:style-name="ce2" office:value-type="string">
            <text:p>FORZA STIMATA ALL'ASSEDIO DI RETHMAR</text:p>
          </table:table-cell>
          <table:table-cell table:style-name="ce2" office:value-type="string">
            <text:p/>
          </table:table-cell>
          <table:table-cell/>
          <table:table-cell/>
        </table:table-row>
        <table:table-row>
          <table:table-cell office:value-type="string">
            <text:p>Scenario A — PG molto attivi (tutte le interferenze)</text:p>
          </table:table-cell>
          <table:table-cell table:style-name="ce2" office:value-type="string">
            <text:p>4.520</text:p>
          </table:table-cell>
          <table:table-cell/>
          <table:table-cell/>
        </table:table-row>
        <table:table-row>
          <table:table-cell office:value-type="string">
            <text:p>Scenario B — PG parzialmente attivi</text:p>
          </table:table-cell>
          <table:table-cell table:style-name="ce2" office:value-type="string">
            <text:p>5.476</text:p>
          </table:table-cell>
          <table:table-cell/>
          <table:table-cell/>
        </table:table-row>
        <table:table-row>
          <table:table-cell office:value-type="string">
            <text:p>Scenario C — PG non interferiscono</text:p>
          </table:table-cell>
          <table:table-cell table:style-name="ce2" office:value-type="string">
            <text:p>5.506</text:p>
          </table:table-cell>
          <table:table-cell/>
          <table:table-cell/>
        </table:table-row>
      </table:table>
      <table:table table:name="Mano Rossa - Composizione">
        <table:table-row>
          <table:table-cell table:style-name="ce2" office:value-type="string">
            <text:p>Nome Unità</text:p>
          </table:table-cell>
          <table:table-cell table:style-name="ce2" office:value-type="string">
            <text:p>Livello Unità</text:p>
          </table:table-cell>
          <table:table-cell table:style-name="ce2" office:value-type="string">
            <text:p>#Unità Iniziali</text:p>
          </table:table-cell>
          <table:table-cell table:style-name="ce2" office:value-type="string">
            <text:p>Perdite</text:p>
          </table:table-cell>
          <table:table-cell table:style-name="ce2" office:value-type="string">
            <text:p>#Unità Correnti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FORZE NUCLEARI HOBGOBLIN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Hobgoblin (Fanteria)</text:p>
          </table:table-cell>
          <table:table-cell office:value-type="string">
            <text:p>Warrior 5 (+2)</text:p>
          </table:table-cell>
          <table:table-cell office:value-type="float" office:value="2000">
            <text:p>2.000</text:p>
          </table:table-cell>
          <table:table-cell office:value-type="float" office:value="0">
            <text:p>0</text:p>
          </table:table-cell>
          <table:table-cell office:value-type="float" office:value="2000">
            <text:p>2.000</text:p>
          </table:table-cell>
          <table:table-cell office:value-type="string">
            <text:p>Dorsale esercito</text:p>
          </table:table-cell>
        </table:table-row>
        <table:table-row>
          <table:table-cell office:value-type="string">
            <text:p>Soldato d'Élite Hobgoblin</text:p>
          </table:table-cell>
          <table:table-cell office:value-type="string">
            <text:p>Fighter 6 (+2)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Vanguardia e assalto</text:p>
          </table:table-cell>
        </table:table-row>
        <table:table-row>
          <table:table-cell office:value-type="string">
            <text:p>Arciere Hobgoblin</text:p>
          </table:table-cell>
          <table:table-cell office:value-type="string">
            <text:p>Warrior 5 (+2)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Copertura a distanza</text:p>
          </table:table-cell>
        </table:table-row>
        <table:table-row>
          <table:table-cell office:value-type="string">
            <text:p>Sergente Hobgoblin</text:p>
          </table:table-cell>
          <table:table-cell office:value-type="string">
            <text:p>Fighter 7 (+2)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1 ogni 40 fanti</text:p>
          </table:table-cell>
        </table:table-row>
        <table:table-row>
          <table:table-cell table:style-name="ce2" office:value-type="string">
            <text:p>Subtotale Hobgoblin</text:p>
          </table:table-cell>
          <table:table-cell/>
          <table:table-cell table:style-name="ce2" office:value-type="string">
            <text:p>2.88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.88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AUSILIARI GOBBLINOID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ugbear Shock Trooper</text:p>
          </table:table-cell>
          <table:table-cell office:value-type="string">
            <text:p>Barbarian 4 (+2)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Assalto alle mura</text:p>
          </table:table-cell>
        </table:table-row>
        <table:table-row>
          <table:table-cell office:value-type="string">
            <text:p>Goblin Skirmisher</text:p>
          </table:table-cell>
          <table:table-cell office:value-type="string">
            <text:p>Warrior 4 (+2)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Molestia e ricognizione</text:p>
          </table:table-cell>
        </table:table-row>
        <table:table-row>
          <table:table-cell office:value-type="string">
            <text:p>Goblin Wolf Rider</text:p>
          </table:table-cell>
          <table:table-cell office:value-type="string">
            <text:p>Warrior 5 (+2)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valleria leggera</text:p>
          </table:table-cell>
        </table:table-row>
        <table:table-row>
          <table:table-cell office:value-type="string">
            <text:p>Orc Ausiliario (schiavo)</text:p>
          </table:table-cell>
          <table:table-cell office:value-type="string">
            <text:p>Warrior 4 (+2)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Fanteria pesante d'impatto</text:p>
          </table:table-cell>
        </table:table-row>
        <table:table-row>
          <table:table-cell table:style-name="ce2" office:value-type="string">
            <text:p>Subtotale Ausiliari</text:p>
          </table:table-cell>
          <table:table-cell/>
          <table:table-cell table:style-name="ce2" office:value-type="string">
            <text:p>1.20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.20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CREATURE PESA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gre da Guerra</text:p>
          </table:table-cell>
          <table:table-cell office:value-type="string">
            <text:p>GS 7 (+2)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Arieti viventi</text:p>
          </table:table-cell>
        </table:table-row>
        <table:table-row>
          <table:table-cell office:value-type="string">
            <text:p>Gigante delle Colline</text:p>
          </table:table-cell>
          <table:table-cell office:value-type="string">
            <text:p>GS 9 (+2)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tiglieria biologica</text:p>
          </table:table-cell>
        </table:table-row>
        <table:table-row>
          <table:table-cell office:value-type="string">
            <text:p>Gigante di Pietra</text:p>
          </table:table-cell>
          <table:table-cell office:value-type="string">
            <text:p>GS 11 (+2)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Élite assedio</text:p>
          </table:table-cell>
        </table:table-row>
        <table:table-row>
          <table:table-cell office:value-type="string">
            <text:p>Gigante del Fuoco (mercenario)</text:p>
          </table:table-cell>
          <table:table-cell office:value-type="string">
            <text:p>GS 13 (+2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rcenari rari</text:p>
          </table:table-cell>
        </table:table-row>
        <table:table-row>
          <table:table-cell office:value-type="string">
            <text:p>Troll</text:p>
          </table:table-cell>
          <table:table-cell office:value-type="string">
            <text:p>GS 7 (+2)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Rigenerazione, terrore</text:p>
          </table:table-cell>
        </table:table-row>
        <table:table-row>
          <table:table-cell office:value-type="string">
            <text:p>Ettin (incl. Gorthak il Trifronte)</text:p>
          </table:table-cell>
          <table:table-cell office:value-type="string">
            <text:p>GS 12 (+2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orthak + 3 altri</text:p>
          </table:table-cell>
        </table:table-row>
        <table:table-row>
          <table:table-cell table:style-name="ce2" office:value-type="string">
            <text:p>Subtotale Creature Pesanti</text:p>
          </table:table-cell>
          <table:table-cell/>
          <table:table-cell table:style-name="ce2" office:value-type="string">
            <text:p>11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17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CREATURE VOLA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yvern (Ghostlord)</text:p>
          </table:table-cell>
          <table:table-cell office:value-type="string">
            <text:p>GS 9 (+2)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Pegno del Lich; 0 se trattato</text:p>
          </table:table-cell>
        </table:table-row>
        <table:table-row>
          <table:table-cell office:value-type="string">
            <text:p>Manticore</text:p>
          </table:table-cell>
          <table:table-cell office:value-type="string">
            <text:p>GS 7 (+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icognizione armata</text:p>
          </table:table-cell>
        </table:table-row>
        <table:table-row>
          <table:table-cell office:value-type="string">
            <text:p>Barghest</text:p>
          </table:table-cell>
          <table:table-cell office:value-type="string">
            <text:p>GS 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Possessione e terrore</text:p>
          </table:table-cell>
        </table:table-row>
        <table:table-row>
          <table:table-cell office:value-type="string">
            <text:p>Lupo Terribile</text:p>
          </table:table-cell>
          <table:table-cell office:value-type="string">
            <text:p>GS 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valleria/ricognizione</text:p>
          </table:table-cell>
        </table:table-row>
        <table:table-row>
          <table:table-cell table:style-name="ce2" office:value-type="string">
            <text:p>Subtotale Volanti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0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SUPPORTO MAGICO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ar Adept (Stregone)</text:p>
          </table:table-cell>
          <table:table-cell office:value-type="string">
            <text:p>Sorcerer 7 (+2)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Artiglieria magica</text:p>
          </table:table-cell>
        </table:table-row>
        <table:table-row>
          <table:table-cell office:value-type="string">
            <text:p>Warpriest di Tiamat</text:p>
          </table:table-cell>
          <table:table-cell office:value-type="string">
            <text:p>Cleric 8 (+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uarigione e dominio</text:p>
          </table:table-cell>
        </table:table-row>
        <table:table-row>
          <table:table-cell office:value-type="string">
            <text:p>Sciamano Draconico</text:p>
          </table:table-cell>
          <table:table-cell office:value-type="string">
            <text:p>Druid 7 (+2)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Controllo bestie</text:p>
          </table:table-cell>
        </table:table-row>
        <table:table-row>
          <table:table-cell table:style-name="ce2" office:value-type="string">
            <text:p>Subtotale Supporto Magico</text:p>
          </table:table-cell>
          <table:table-cell/>
          <table:table-cell table:style-name="ce2" office:value-type="string">
            <text:p>3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9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FAZIONE DROW (Sonjak)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Drow d'Élite</text:p>
          </table:table-cell>
          <table:table-cell office:value-type="string">
            <text:p>Fighter 4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Mithral, invisibilità</text:p>
          </table:table-cell>
        </table:table-row>
        <table:table-row>
          <table:table-cell office:value-type="string">
            <text:p>Chierico/Mago Drow</text:p>
          </table:table-cell>
          <table:table-cell office:value-type="string">
            <text:p>Cleric 8 / Wiz 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Supporto magico avanzato</text:p>
          </table:table-cell>
        </table:table-row>
        <table:table-row>
          <table:table-cell office:value-type="string">
            <text:p>Drider (Cavaliere)</text:p>
          </table:table-cell>
          <table:table-cell office:value-type="string">
            <text:p>GS 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avalleria demoniaca</text:p>
          </table:table-cell>
        </table:table-row>
        <table:table-row>
          <table:table-cell table:style-name="ce2" office:value-type="string">
            <text:p>Subtotale Drow</text:p>
          </table:table-cell>
          <table:table-cell/>
          <table:table-cell table:style-name="ce2" office:value-type="string">
            <text:p>30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0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FAZIONE GITHYANK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valiere Githyanki (su drago)</text:p>
          </table:table-cell>
          <table:table-cell office:value-type="string">
            <text:p>Fighter 8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valleria aerea d'élite</text:p>
          </table:table-cell>
        </table:table-row>
        <table:table-row>
          <table:table-cell office:value-type="string">
            <text:p>Guerriero Githyanki</text:p>
          </table:table-cell>
          <table:table-cell office:value-type="string">
            <text:p>Fighter 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pade argentate</text:p>
          </table:table-cell>
        </table:table-row>
        <table:table-row>
          <table:table-cell office:value-type="string">
            <text:p>Psion Githyanki</text:p>
          </table:table-cell>
          <table:table-cell office:value-type="string">
            <text:p>Psion 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Guerra psichica</text:p>
          </table:table-cell>
        </table:table-row>
        <table:table-row>
          <table:table-cell table:style-name="ce2" office:value-type="string">
            <text:p>Subtotale Githyanki</text:p>
          </table:table-cell>
          <table:table-cell/>
          <table:table-cell table:style-name="ce2" office:value-type="string">
            <text:p>37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7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SCHIAVI DA GUERRA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oxo da Guerra (schiavo)</text:p>
          </table:table-cell>
          <table:table-cell office:value-type="string">
            <text:p>GS 10 (+2)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RIVOLTA POSSIBILE — vedi sheet Centauri/Loxo</text:p>
          </table:table-cell>
        </table:table-row>
        <table:table-row>
          <table:table-cell office:value-type="string">
            <text:p>Centauro Guerriero (schiavo)</text:p>
          </table:table-cell>
          <table:table-cell office:value-type="string">
            <text:p>Warrior 4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RIVOLTA POSSIBILE — vedi sheet Centauri/Loxo</text:p>
          </table:table-cell>
        </table:table-row>
        <table:table-row>
          <table:table-cell office:value-type="string">
            <text:p>Centauro Esploratore (schiavo)</text:p>
          </table:table-cell>
          <table:table-cell office:value-type="string">
            <text:p>Ranger 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IVOLTA POSSIBILE</text:p>
          </table:table-cell>
        </table:table-row>
        <table:table-row>
          <table:table-cell table:style-name="ce2" office:value-type="string">
            <text:p>Subtotale Schiavi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44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MERCENARI GNOLL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Gnoll</text:p>
          </table:table-cell>
          <table:table-cell office:value-type="string">
            <text:p>Warrior 3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Affidabili ma brutali</text:p>
          </table:table-cell>
        </table:table-row>
        <table:table-row>
          <table:table-cell office:value-type="string">
            <text:p>Pack Lord Gnoll</text:p>
          </table:table-cell>
          <table:table-cell office:value-type="string">
            <text:p>Fighter 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1 ogni 10 guerrieri</text:p>
          </table:table-cell>
        </table:table-row>
        <table:table-row>
          <table:table-cell office:value-type="string">
            <text:p>Sciamano Gnoll</text:p>
          </table:table-cell>
          <table:table-cell office:value-type="string">
            <text:p>Cleric 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Guarigione tribale</text:p>
          </table:table-cell>
        </table:table-row>
        <table:table-row>
          <table:table-cell table:style-name="ce2" office:value-type="string">
            <text:p>Subtotale Gnoll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70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TOTALE GENERALE</text:p>
          </table:table-cell>
          <table:table-cell/>
          <table:table-cell table:style-name="ce2" office:value-type="string">
            <text:p>6.16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6.161</text:p>
          </table:table-cell>
          <table:table-cell/>
        </table:table-row>
      </table:table>
      <table:table table:name="Dinamica Marcia">
        <table:table-row>
          <table:table-cell table:style-name="ce2" office:value-type="string">
            <text:p>DINAMICA DELLA MARCIA — SETTIMANA PER SETTIMANA</text:p>
          </table:table-cell>
          <table:table-cell/>
          <table:table-cell/>
          <table:table-cell/>
          <table:table-cell/>
          <table:table-cell/>
        </table:table-row>
        <table:table-row>
          <table:table-cell table:style-name="ce2" office:value-type="string">
            <text:p>Fase</text:p>
          </table:table-cell>
          <table:table-cell table:style-name="ce2" office:value-type="string">
            <text:p>Evento</text:p>
          </table:table-cell>
          <table:table-cell table:style-name="ce2" office:value-type="string">
            <text:p>Corpo Principale</text:p>
          </table:table-cell>
          <table:table-cell table:style-name="ce2" office:value-type="string">
            <text:p>+ Ritorno</text:p>
          </table:table-cell>
          <table:table-cell table:style-name="ce2" office:value-type="string">
            <text:p>Totale Attivo</text:p>
          </table:table-cell>
          <table:table-cell table:style-name="ce2" office:value-type="string">
            <text:p>Note</text:p>
          </table:table-cell>
        </table:table-row>
        <table:table-row>
          <table:table-cell office:value-type="string">
            <text:p>T-0</text:p>
          </table:table-cell>
          <table:table-cell office:value-type="string">
            <text:p>Assemblaggio iniziale</text:p>
          </table:table-cell>
          <table:table-cell office:value-type="float" office:value="4793">
            <text:p>4.793</text:p>
          </table:table-cell>
          <table:table-cell office:value-type="string">
            <text:p>—</text:p>
          </table:table-cell>
          <table:table-cell office:value-type="float" office:value="6161">
            <text:p>6.161</text:p>
          </table:table-cell>
          <table:table-cell office:value-type="string">
            <text:p>Incl. Hammerfist 793 + Dauth 575</text:p>
          </table:table-cell>
        </table:table-row>
        <table:table-row>
          <table:table-cell office:value-type="string">
            <text:p>T-1a</text:p>
          </table:table-cell>
          <table:table-cell office:value-type="string">
            <text:p>Fine Sett.1 - Ponte intatto</text:p>
          </table:table-cell>
          <table:table-cell office:value-type="float" office:value="4643">
            <text:p>4.643</text:p>
          </table:table-cell>
          <table:table-cell office:value-type="string">
            <text:p>—</text:p>
          </table:table-cell>
          <table:table-cell office:value-type="float" office:value="4643">
            <text:p>4.643</text:p>
          </table:table-cell>
          <table:table-cell office:value-type="string">
            <text:p>Attrito −120, Drellin's Ferry −30</text:p>
          </table:table-cell>
        </table:table-row>
        <table:table-row>
          <table:table-cell office:value-type="string">
            <text:p>T-1b</text:p>
          </table:table-cell>
          <table:table-cell office:value-type="string">
            <text:p>Fine Sett.1 - Ponte distrutto</text:p>
          </table:table-cell>
          <table:table-cell office:value-type="float" office:value="4443">
            <text:p>4.443</text:p>
          </table:table-cell>
          <table:table-cell office:value-type="string">
            <text:p>—</text:p>
          </table:table-cell>
          <table:table-cell office:value-type="float" office:value="4443">
            <text:p>4.443</text:p>
          </table:table-cell>
          <table:table-cell office:value-type="string">
            <text:p>Extra −200 al guado alternativo</text:p>
          </table:table-cell>
        </table:table-row>
        <table:table-row>
          <table:table-cell/>
          <table:table-cell office:value-type="string">
            <text:p>SE RIVOLTA CENTAURI</text:p>
          </table:table-cell>
          <table:table-cell office:value-type="string">
            <text:p>−180</text:p>
          </table:table-cell>
          <table:table-cell office:value-type="string">
            <text:p>−400 centauri</text:p>
          </table:table-cell>
          <table:table-cell office:value-type="string">
            <text:p>applicare a T-1</text:p>
          </table:table-cell>
          <table:table-cell office:value-type="string">
            <text:p>PG attivano rivolta</text:p>
          </table:table-cell>
        </table:table-row>
        <table:table-row>
          <table:table-cell/>
          <table:table-cell office:value-type="string">
            <text:p>SE RIVOLTA LOXO</text:p>
          </table:table-cell>
          <table:table-cell office:value-type="string">
            <text:p>−120</text:p>
          </table:table-cell>
          <table:table-cell office:value-type="string">
            <text:p>−15 loxo</text:p>
          </table:table-cell>
          <table:table-cell office:value-type="string">
            <text:p>applicare a T-1</text:p>
          </table:table-cell>
          <table:table-cell office:value-type="string">
            <text:p>PG attivano rivolta</text:p>
          </table:table-cell>
        </table:table-row>
        <table:table-row>
          <table:table-cell office:value-type="string">
            <text:p>T-2</text:p>
          </table:table-cell>
          <table:table-cell office:value-type="string">
            <text:p>Fine Sett.2 - Ritorno Hammerfist</text:p>
          </table:table-cell>
          <table:table-cell office:value-type="float" office:value="4333">
            <text:p>4.333</text:p>
          </table:table-cell>
          <table:table-cell office:value-type="float" office:value="486">
            <text:p>+486</text:p>
          </table:table-cell>
          <table:table-cell office:value-type="float" office:value="4819">
            <text:p>4.819</text:p>
          </table:table-cell>
          <table:table-cell office:value-type="string">
            <text:p>Attrito sett.2 −110, +486 sopravvissuti Hammerfist</text:p>
          </table:table-cell>
        </table:table-row>
        <table:table-row>
          <table:table-cell office:value-type="string">
            <text:p>T-2 con distruzione ponte</text:p>
          </table:table-cell>
          <table:table-cell office:value-type="string">
            <text:p>Fine Sett.2 - tutti gli eventi</text:p>
          </table:table-cell>
          <table:table-cell office:value-type="float" office:value="4133">
            <text:p>4.133</text:p>
          </table:table-cell>
          <table:table-cell office:value-type="float" office:value="486">
            <text:p>+486</text:p>
          </table:table-cell>
          <table:table-cell office:value-type="float" office:value="4619">
            <text:p>4.619</text:p>
          </table:table-cell>
          <table:table-cell office:value-type="string">
            <text:p>Ponte + attrito</text:p>
          </table:table-cell>
        </table:table-row>
        <table:table-row>
          <table:table-cell office:value-type="string">
            <text:p>T-3a</text:p>
          </table:table-cell>
          <table:table-cell office:value-type="string">
            <text:p>Fine Sett.3 - Ritorno Dauth</text:p>
          </table:table-cell>
          <table:table-cell office:value-type="float" office:value="4724">
            <text:p>4.724</text:p>
          </table:table-cell>
          <table:table-cell office:value-type="float" office:value="440">
            <text:p>+440</text:p>
          </table:table-cell>
          <table:table-cell office:value-type="float" office:value="5164">
            <text:p>5.164</text:p>
          </table:table-cell>
          <table:table-cell office:value-type="string">
            <text:p>Attrito sett.3 −95, +440 sopravvissuti Dauth</text:p>
          </table:table-cell>
        </table:table-row>
        <table:table-row>
          <table:table-cell office:value-type="string">
            <text:p>T-3b</text:p>
          </table:table-cell>
          <table:table-cell office:value-type="string">
            <text:p>Fine Sett.3 - Con sabotaggio Drow</text:p>
          </table:table-cell>
          <table:table-cell office:value-type="float" office:value="4474">
            <text:p>4.474</text:p>
          </table:table-cell>
          <table:table-cell office:value-type="float" office:value="440">
            <text:p>+440</text:p>
          </table:table-cell>
          <table:table-cell office:value-type="float" office:value="4914">
            <text:p>4.914</text:p>
          </table:table-cell>
          <table:table-cell office:value-type="string">
            <text:p>Sabotaggio PG −250 Drow</text:p>
          </table:table-cell>
        </table:table-row>
        <table:table-row>
          <table:table-cell office:value-type="string">
            <text:p>T-Final A</text:p>
          </table:table-cell>
          <table:table-cell office:value-type="string">
            <text:p>Assedio Rethmar — PG molto attivi</text:p>
          </table:table-cell>
          <table:table-cell table:style-name="ce2" office:value-type="string">
            <text:p>4.520</text:p>
          </table:table-cell>
          <table:table-cell office:value-type="string">
            <text:p>—</text:p>
          </table:table-cell>
          <table:table-cell table:style-name="ce2" office:value-type="string">
            <text:p>4.520</text:p>
          </table:table-cell>
          <table:table-cell office:value-type="string">
            <text:p>Tutti gli eventi negativi</text:p>
          </table:table-cell>
        </table:table-row>
        <table:table-row>
          <table:table-cell office:value-type="string">
            <text:p>T-Final B</text:p>
          </table:table-cell>
          <table:table-cell office:value-type="string">
            <text:p>Assedio Rethmar — PG parzialmente attivi</text:p>
          </table:table-cell>
          <table:table-cell table:style-name="ce2" office:value-type="string">
            <text:p>5.476</text:p>
          </table:table-cell>
          <table:table-cell office:value-type="string">
            <text:p>—</text:p>
          </table:table-cell>
          <table:table-cell table:style-name="ce2" office:value-type="string">
            <text:p>5.476</text:p>
          </table:table-cell>
          <table:table-cell office:value-type="string">
            <text:p>Metà eventi</text:p>
          </table:table-cell>
        </table:table-row>
        <table:table-row>
          <table:table-cell office:value-type="string">
            <text:p>T-Final C</text:p>
          </table:table-cell>
          <table:table-cell office:value-type="string">
            <text:p>Assedio Rethmar — PG inattivi</text:p>
          </table:table-cell>
          <table:table-cell table:style-name="ce2" office:value-type="string">
            <text:p>5.506</text:p>
          </table:table-cell>
          <table:table-cell office:value-type="string">
            <text:p>—</text:p>
          </table:table-cell>
          <table:table-cell table:style-name="ce2" office:value-type="string">
            <text:p>5.506</text:p>
          </table:table-cell>
          <table:table-cell office:value-type="string">
            <text:p>Solo attrito standard</text:p>
          </table:table-cell>
        </table:table-row>
        <table:table-row>
          <table:table-cell/>
        </table:table-row>
        <table:table-row>
          <table:table-cell table:style-name="ce2" office:value-type="string">
            <text:p>CLOCK DI AZARR KUL — IMPATTO INTERFERENZE PG</text:p>
          </table:table-cell>
          <table:table-cell/>
          <table:table-cell/>
          <table:table-cell/>
          <table:table-cell/>
          <table:table-cell/>
        </table:table-row>
        <table:table-row>
          <table:table-cell table:style-name="ce2" office:value-type="string">
            <text:p>Condizione</text:p>
          </table:table-cell>
          <table:table-cell table:style-name="ce2" office:value-type="string">
            <text:p>Giorni aggiuntivi</text:p>
          </table:table-cell>
          <table:table-cell table:style-name="ce2" office:value-type="string">
            <text:p>Giorni Rimasti</text:p>
          </table:table-cell>
          <table:table-cell/>
          <table:table-cell/>
          <table:table-cell/>
        </table:table-row>
        <table:table-row>
          <table:table-cell office:value-type="string">
            <text:p>Stato attuale (nessuna interferenza)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/>
          <table:table-cell/>
        </table:table-row>
        <table:table-row>
          <table:table-cell office:value-type="string">
            <text:p>Solo rivolta centauri</text:p>
          </table:table-cell>
          <table:table-cell office:value-type="float" office:value="2">
            <text:p>+2</text:p>
          </table:table-cell>
          <table:table-cell office:value-type="float" office:value="11">
            <text:p>11</text:p>
          </table:table-cell>
          <table:table-cell/>
          <table:table-cell/>
          <table:table-cell/>
        </table:table-row>
        <table:table-row>
          <table:table-cell office:value-type="string">
            <text:p>Solo rivolta loxo</text:p>
          </table:table-cell>
          <table:table-cell office:value-type="float" office:value="1">
            <text:p>+1</text:p>
          </table:table-cell>
          <table:table-cell office:value-type="float" office:value="10">
            <text:p>10</text:p>
          </table:table-cell>
          <table:table-cell/>
          <table:table-cell/>
          <table:table-cell/>
        </table:table-row>
        <table:table-row>
          <table:table-cell office:value-type="string">
            <text:p>Entrambe le rivolte</text:p>
          </table:table-cell>
          <table:table-cell office:value-type="float" office:value="3">
            <text:p>+3</text:p>
          </table:table-cell>
          <table:table-cell office:value-type="float" office:value="12">
            <text:p>12</text:p>
          </table:table-cell>
          <table:table-cell/>
          <table:table-cell/>
          <table:table-cell/>
        </table:table-row>
        <table:table-row>
          <table:table-cell office:value-type="string">
            <text:p>Ponte di Skull Gorge distrutto</text:p>
          </table:table-cell>
          <table:table-cell office:value-type="string">
            <text:p>+2-3</text:p>
          </table:table-cell>
          <table:table-cell office:value-type="string">
            <text:p>11-12</text:p>
          </table:table-cell>
          <table:table-cell/>
          <table:table-cell/>
          <table:table-cell/>
        </table:table-row>
        <table:table-row>
          <table:table-cell office:value-type="string">
            <text:p>Tutte le interferenze</text:p>
          </table:table-cell>
          <table:table-cell office:value-type="string">
            <text:p>+5-6</text:p>
          </table:table-cell>
          <table:table-cell office:value-type="string">
            <text:p>14-15</text:p>
          </table:table-cell>
          <table:table-cell/>
          <table:table-cell/>
          <table:table-cell/>
        </table:table-row>
      </table:table>
      <table:table table:name="Difensori - Città">
        <table:table-row>
          <table:table-cell table:style-name="ce2" office:value-type="string">
            <text:p>DIFENSORI — CITTÀ E VILLAGGI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Insediamento</text:p>
          </table:table-cell>
          <table:table-cell table:style-name="ce2" office:value-type="string">
            <text:p>Categoria</text:p>
          </table:table-cell>
          <table:table-cell table:style-name="ce2" office:value-type="string">
            <text:p>Guardia Fissa</text:p>
          </table:table-cell>
          <table:table-cell table:style-name="ce2" office:value-type="string">
            <text:p>Milizi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GRANDI CITTÀ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thmar (= Brindol)</text:p>
          </table:table-cell>
          <table:table-cell office:value-type="string">
            <text:p>Grande Città 40.000 mo</text:p>
          </table:table-cell>
          <table:table-cell office:value-type="float" office:value="751">
            <text:p>751</text:p>
          </table:table-cell>
          <table:table-cell office:value-type="float" office:value="300">
            <text:p>300</text:p>
          </table:table-cell>
          <table:table-cell office:value-type="float" office:value="1051">
            <text:p>1.051</text:p>
          </table:table-cell>
          <table:table-cell office:value-type="string">
            <text:p>Pop. ~15.000; incl. maghi e cavalleria</text:p>
          </table:table-cell>
        </table:table-row>
        <table:table-row>
          <table:table-cell office:value-type="string">
            <text:p>Cannathgate (= Dennovar)</text:p>
          </table:table-cell>
          <table:table-cell office:value-type="string">
            <text:p>Grande Città 40.000 mo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float" office:value="660">
            <text:p>660</text:p>
          </table:table-cell>
          <table:table-cell office:value-type="string">
            <text:p>Pop. ~12.000; max 150 a Rethmar</text:p>
          </table:table-cell>
        </table:table-row>
        <table:table-row>
          <table:table-cell/>
        </table:table-row>
        <table:table-row>
          <table:table-cell table:style-name="ce2" office:value-type="string">
            <text:p>=== RIFUGI DI HAMMERFIST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ammerfist Holds (pre-battaglia)</text:p>
          </table:table-cell>
          <table:table-cell office:value-type="string">
            <text:p>Piccola Città 15.000 mo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Livello di partenza</text:p>
          </table:table-cell>
        </table:table-row>
        <table:table-row>
          <table:table-cell office:value-type="string">
            <text:p>Hammerfist Holds (post-battaglia)</text:p>
          </table:table-cell>
          <table:table-cell office:value-type="string">
            <text:p>Piccola Città 15.000 mo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10 caduti; 90 feriti/guaritori</text:p>
          </table:table-cell>
        </table:table-row>
        <table:table-row>
          <table:table-cell office:value-type="string">
            <text:p>150 Lance di Re Thorek (cond.)</text:p>
          </table:table-cell>
          <table:table-cell office:value-type="string">
            <text:p>Rinforzo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e Tordek vince il Torneo — Fighter 4-6</text:p>
          </table:table-cell>
        </table:table-row>
        <table:table-row>
          <table:table-cell/>
        </table:table-row>
        <table:table-row>
          <table:table-cell table:style-name="ce2" office:value-type="string">
            <text:p>=== GRANDI PAESI (3.000 mo)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raghetto di Drellin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string">
            <text:p>Quasi tutti evacuano prima dell'orda</text:p>
          </table:table-cell>
        </table:table-row>
        <table:table-row>
          <table:table-cell office:value-type="string">
            <text:p>Accampamento Tiri Kitor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string">
            <text:p>Elfi selvatici; 300-500 se alleanza</text:p>
          </table:table-cell>
        </table:table-row>
        <table:table-row>
          <table:table-cell office:value-type="string">
            <text:p>Terrelton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Evacuano; ~30-50 raggiungono Rethmar</text:p>
          </table:table-cell>
        </table:table-row>
        <table:table-row>
          <table:table-cell office:value-type="string">
            <text:p>Guado delle Streghe (Witchcross)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+ Circolo Druidi (12-15) se quest Hella</text:p>
          </table:table-cell>
        </table:table-row>
        <table:table-row>
          <table:table-cell/>
        </table:table-row>
        <table:table-row>
          <table:table-cell table:style-name="ce2" office:value-type="string">
            <text:p>=== PICCOLI INSEDIAME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so di Nimon / Nimon Gap</text:p>
          </table:table-cell>
          <table:table-cell office:value-type="string">
            <text:p>Villaggio 200 mo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Evacuano; valore tattico: passo stretto</text:p>
          </table:table-cell>
        </table:table-row>
        <table:table-row>
          <table:table-cell office:value-type="string">
            <text:p>Talar</text:p>
          </table:table-cell>
          <table:table-cell office:value-type="string">
            <text:p>Piccolo Paes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>
            <text:p>Evacuano verso Rethmar</text:p>
          </table:table-cell>
        </table:table-row>
      </table:table>
      <table:table table:name="Coalizione Rethmar">
        <table:table-row>
          <table:table-cell table:style-name="ce2" office:value-type="string">
            <text:p>COALIZIONE DEI DIFENSORI — RETHMAR (BATTAGLIA FINALE)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orza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Requisito</text:p>
          </table:table-cell>
          <table:table-cell table:style-name="ce2" office:value-type="string">
            <text:p>Condizionata?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FORZE GARANTITE ===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Guardia Regolare Rethmar</text:p>
          </table:table-cell>
          <table:table-cell office:value-type="float" office:value="400">
            <text:p>4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3</text:p>
          </table:table-cell>
        </table:table-row>
        <table:table-row>
          <table:table-cell office:value-type="string">
            <text:p>Guardia d'Élite (Lord Jarmaath)</text:p>
          </table:table-cell>
          <table:table-cell office:value-type="float" office:value="100">
            <text:p>1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5</text:p>
          </table:table-cell>
        </table:table-row>
        <table:table-row>
          <table:table-cell office:value-type="string">
            <text:p>Milizia Armata</text:p>
          </table:table-cell>
          <table:table-cell office:value-type="float" office:value="300">
            <text:p>3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arrior 1</text:p>
          </table:table-cell>
        </table:table-row>
        <table:table-row>
          <table:table-cell office:value-type="string">
            <text:p>Arcieri sulle Mura</text:p>
          </table:table-cell>
          <table:table-cell office:value-type="float" office:value="150">
            <text:p>15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2</text:p>
          </table:table-cell>
        </table:table-row>
        <table:table-row>
          <table:table-cell office:value-type="string">
            <text:p>Cavalleria Cittadina</text:p>
          </table:table-cell>
          <table:table-cell office:value-type="float" office:value="80">
            <text:p>8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Ranger 4</text:p>
          </table:table-cell>
        </table:table-row>
        <table:table-row>
          <table:table-cell office:value-type="string">
            <text:p>Maghi da Guerra di Rethmar</text:p>
          </table:table-cell>
          <table:table-cell office:value-type="float" office:value="20">
            <text:p>2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izard 7 / Sorc 6</text:p>
          </table:table-cell>
        </table:table-row>
        <table:table-row>
          <table:table-cell office:value-type="string">
            <text:p>Capitana Brenna Sorvane (PNG)</text:p>
          </table:table-cell>
          <table:table-cell office:value-type="float" office:value="1">
            <text:p>1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10; comandante</text:p>
          </table:table-cell>
        </table:table-row>
        <table:table-row>
          <table:table-cell office:value-type="string">
            <text:p>12 Ranger Elfici su Gufi (post-Hammerfist)</text:p>
          </table:table-cell>
          <table:table-cell office:value-type="float" office:value="12">
            <text:p>12</text:p>
          </table:table-cell>
          <table:table-cell office:value-type="string">
            <text:p>Quasi fisso</text:p>
          </table:table-cell>
          <table:table-cell office:value-type="string">
            <text:p>Parziale</text:p>
          </table:table-cell>
          <table:table-cell office:value-type="string">
            <text:p>Capitano Lunapiena; torna dopo Hammerfist</text:p>
          </table:table-cell>
        </table:table-row>
        <table:table-row>
          <table:table-cell office:value-type="string">
            <text:p>Rifugiati armati (Terrelton, Talar ecc.)</text:p>
          </table:table-cell>
          <table:table-cell office:value-type="float" office:value="80">
            <text:p>8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arrior 1</text:p>
          </table:table-cell>
        </table:table-row>
        <table:table-row>
          <table:table-cell table:style-name="ce2" office:value-type="string">
            <text:p>Subtotale Garantito</text:p>
          </table:table-cell>
          <table:table-cell table:style-name="ce2" office:value-type="string">
            <text:p>1.143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=== FORZE CONDIZIONATE DA QUEST PG ===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150 Lance Naniche (Re Thorek)</text:p>
          </table:table-cell>
          <table:table-cell office:value-type="float" office:value="150">
            <text:p>150</text:p>
          </table:table-cell>
          <table:table-cell office:value-type="string">
            <text:p>Tordek vince Torneo di Dauth</text:p>
          </table:table-cell>
          <table:table-cell office:value-type="string">
            <text:p>SÌ</text:p>
          </table:table-cell>
          <table:table-cell office:value-type="string">
            <text:p>Fighter 4-6; arrivano Giorno 35</text:p>
          </table:table-cell>
        </table:table-row>
        <table:table-row>
          <table:table-cell office:value-type="string">
            <text:p>Rinforzi Cannathgate</text:p>
          </table:table-cell>
          <table:table-cell office:value-type="float" office:value="150">
            <text:p>150</text:p>
          </table:table-cell>
          <table:table-cell office:value-type="string">
            <text:p>Diplomazia CD 20 o piano militare</text:p>
          </table:table-cell>
          <table:table-cell office:value-type="string">
            <text:p>SÌ</text:p>
          </table:table-cell>
          <table:table-cell office:value-type="string">
            <text:p>Fighter 3</text:p>
          </table:table-cell>
        </table:table-row>
        <table:table-row>
          <table:table-cell office:value-type="string">
            <text:p>Esploratori Tiri Kitor</text:p>
          </table:table-cell>
          <table:table-cell office:value-type="float" office:value="300">
            <text:p>300</text:p>
          </table:table-cell>
          <table:table-cell office:value-type="string">
            <text:p>Quest Starsong Hill completata</text:p>
          </table:table-cell>
          <table:table-cell office:value-type="string">
            <text:p>SÌ</text:p>
          </table:table-cell>
          <table:table-cell office:value-type="string">
            <text:p>Ranger 6</text:p>
          </table:table-cell>
        </table:table-row>
        <table:table-row>
          <table:table-cell office:value-type="string">
            <text:p>Cavalieri Tiri Kitor su Civette</text:p>
          </table:table-cell>
          <table:table-cell office:value-type="float" office:value="50">
            <text:p>50</text:p>
          </table:table-cell>
          <table:table-cell office:value-type="string">
            <text:p>Quest Starsong Hill completata</text:p>
          </table:table-cell>
          <table:table-cell office:value-type="string">
            <text:p>SÌ</text:p>
          </table:table-cell>
          <table:table-cell office:value-type="string">
            <text:p>GS 8; dominio aereo</text:p>
          </table:table-cell>
        </table:table-row>
        <table:table-row>
          <table:table-cell office:value-type="string">
            <text:p>Druidi del Circolo (Custodi di Eth)</text:p>
          </table:table-cell>
          <table:table-cell office:value-type="float" office:value="15">
            <text:p>15</text:p>
          </table:table-cell>
          <table:table-cell office:value-type="string">
            <text:p>Hella completa rituale Bosco Sacro</text:p>
          </table:table-cell>
          <table:table-cell office:value-type="string">
            <text:p>SÌ</text:p>
          </table:table-cell>
          <table:table-cell office:value-type="string">
            <text:p>Druid 8-10</text:p>
          </table:table-cell>
        </table:table-row>
        <table:table-row>
          <table:table-cell office:value-type="string">
            <text:p>Treant alleati</text:p>
          </table:table-cell>
          <table:table-cell office:value-type="float" office:value="6">
            <text:p>6</text:p>
          </table:table-cell>
          <table:table-cell office:value-type="string">
            <text:p>Hella pianta il Ghianda del Cerchio</text:p>
          </table:table-cell>
          <table:table-cell office:value-type="string">
            <text:p>SÌ</text:p>
          </table:table-cell>
          <table:table-cell office:value-type="string">
            <text:p>GS 9; macchine da guerra</text:p>
          </table:table-cell>
        </table:table-row>
        <table:table-row>
          <table:table-cell office:value-type="string">
            <text:p>Animali compagni druidi (~5 per druido)</text:p>
          </table:table-cell>
          <table:table-cell office:value-type="float" office:value="75">
            <text:p>75</text:p>
          </table:table-cell>
          <table:table-cell office:value-type="string">
            <text:p>Con i druidi</text:p>
          </table:table-cell>
          <table:table-cell office:value-type="string">
            <text:p>SÌ</text:p>
          </table:table-cell>
          <table:table-cell office:value-type="string">
            <text:p>Vari GS</text:p>
          </table:table-cell>
        </table:table-row>
        <table:table-row>
          <table:table-cell office:value-type="string">
            <text:p>Ghostlord — Non Morti alleati</text:p>
          </table:table-cell>
          <table:table-cell office:value-type="float" office:value="300">
            <text:p>300</text:p>
          </table:table-cell>
          <table:table-cell office:value-type="string">
            <text:p>Negoziazione Lich (Diplomacy CD 30-35)</text:p>
          </table:table-cell>
          <table:table-cell office:value-type="string">
            <text:p>SÌ</text:p>
          </table:table-cell>
          <table:table-cell office:value-type="string">
            <text:p>Leoni spettrali, wight ecc.</text:p>
          </table:table-cell>
        </table:table-row>
        <table:table-row>
          <table:table-cell office:value-type="string">
            <text:p>Orion Pelleorsa (PNG Druido)</text:p>
          </table:table-cell>
          <table:table-cell office:value-type="float" office:value="1">
            <text:p>1</text:p>
          </table:table-cell>
          <table:table-cell office:value-type="string">
            <text:p>Avvisato in tempo</text:p>
          </table:table-cell>
          <table:table-cell office:value-type="string">
            <text:p>SÌ</text:p>
          </table:table-cell>
          <table:table-cell office:value-type="string">
            <text:p>Druid 14; GS 14</text:p>
          </table:table-cell>
        </table:table-row>
        <table:table-row>
          <table:table-cell office:value-type="string">
            <text:p>Maestro Tempestas (PNG Bardo/Arcimago)</text:p>
          </table:table-cell>
          <table:table-cell office:value-type="float" office:value="1">
            <text:p>1</text:p>
          </table:table-cell>
          <table:table-cell office:value-type="string">
            <text:p>PG lo hanno supportato</text:p>
          </table:table-cell>
          <table:table-cell office:value-type="string">
            <text:p>SÌ</text:p>
          </table:table-cell>
          <table:table-cell office:value-type="string">
            <text:p>Bard 12/Arcm. 2; GS 14</text:p>
          </table:table-cell>
        </table:table-row>
        <table:table-row>
          <table:table-cell office:value-type="string">
            <text:p>Circolo degli Otto (Arcimaghi)</text:p>
          </table:table-cell>
          <table:table-cell office:value-type="float" office:value="8">
            <text:p>8</text:p>
          </table:table-cell>
          <table:table-cell office:value-type="string">
            <text:p>Arrivano automaticamente Giorno 38</text:p>
          </table:table-cell>
          <table:table-cell office:value-type="string">
            <text:p>Fisso</text:p>
          </table:table-cell>
          <table:table-cell office:value-type="string">
            <text:p>Solo rituale Mythal; non in mischia</text:p>
          </table:table-cell>
        </table:table-row>
        <table:table-row>
          <table:table-cell/>
        </table:table-row>
        <table:table-row>
          <table:table-cell table:style-name="ce2" office:value-type="string">
            <text:p>=== RIEPILOGO SCENARI ===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Scenario</text:p>
          </table:table-cell>
          <table:table-cell table:style-name="ce2" office:value-type="string">
            <text:p>Difensori</text:p>
          </table:table-cell>
          <table:table-cell table:style-name="ce2" office:value-type="string">
            <text:p>Mano Rossa</text:p>
          </table:table-cell>
          <table:table-cell table:style-name="ce2" office:value-type="string">
            <text:p>Rapporto</text:p>
          </table:table-cell>
          <table:table-cell table:style-name="ce2" office:value-type="string">
            <text:p>Note</text:p>
          </table:table-cell>
        </table:table-row>
        <table:table-row>
          <table:table-cell office:value-type="string">
            <text:p>Miglior caso (tutte le alleanze)</text:p>
          </table:table-cell>
          <table:table-cell table:style-name="ce2" office:value-type="string">
            <text:p>2.406</text:p>
          </table:table-cell>
          <table:table-cell office:value-type="float" office:value="4520">
            <text:p>4.520</text:p>
          </table:table-cell>
          <table:table-cell office:value-type="string">
            <text:p>1.9:1</text:p>
          </table:table-cell>
          <table:table-cell office:value-type="string">
            <text:p>Vincibile con PG e fortezza</text:p>
          </table:table-cell>
        </table:table-row>
        <table:table-row>
          <table:table-cell office:value-type="string">
            <text:p>Caso medio (metà alleanze)</text:p>
          </table:table-cell>
          <table:table-cell table:style-name="ce2" office:value-type="string">
            <text:p>1.720</text:p>
          </table:table-cell>
          <table:table-cell office:value-type="float" office:value="5476">
            <text:p>5.476</text:p>
          </table:table-cell>
          <table:table-cell office:value-type="string">
            <text:p>3.2:1</text:p>
          </table:table-cell>
          <table:table-cell office:value-type="string">
            <text:p>Duro; PG cruciali</text:p>
          </table:table-cell>
        </table:table-row>
        <table:table-row>
          <table:table-cell office:value-type="string">
            <text:p>Peggior caso (solo guarnigione)</text:p>
          </table:table-cell>
          <table:table-cell table:style-name="ce2" office:value-type="string">
            <text:p>1.143</text:p>
          </table:table-cell>
          <table:table-cell office:value-type="float" office:value="5506">
            <text:p>5.506</text:p>
          </table:table-cell>
          <table:table-cell office:value-type="string">
            <text:p>4.8:1</text:p>
          </table:table-cell>
          <table:table-cell office:value-type="string">
            <text:p>Quasi impossibile senza PG eroici</text:p>
          </table:table-cell>
        </table:table-row>
      </table:table>
      <table:table table:name="Centauri e Loxo">
        <table:table-row>
          <table:table-cell table:style-name="ce2" office:value-type="string">
            <text:p>CENTAURI E LOXO — DINAMICA RIVOLTE E IMPATTO MARCIA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CENTAURI (400 schiavi — 350 Guerrieri + 50 Esploratori)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Effetto sulla marcia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Rallentamento colonna (resistenza passiva)</text:p>
          </table:table-cell>
          <table:table-cell office:value-type="string">
            <text:p>−15% velocità</text:p>
          </table:table-cell>
          <table:table-cell/>
          <table:table-cell/>
          <table:table-cell/>
        </table:table-row>
        <table:table-row>
          <table:table-cell office:value-type="string">
            <text:p>Guardie necessarie (distrazione risorse)</text:p>
          </table:table-cell>
          <table:table-cell office:value-type="string">
            <text:p>~800 hobgoblin su turni</text:p>
          </table:table-cell>
          <table:table-cell/>
          <table:table-cell/>
          <table:table-cell/>
        </table:table-row>
        <table:table-row>
          <table:table-cell office:value-type="string">
            <text:p>Giorni aggiuntivi di marcia</text:p>
          </table:table-cell>
          <table:table-cell office:value-type="string">
            <text:p>+2-3 giorni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ase Rivolta</text:p>
          </table:table-cell>
          <table:table-cell table:style-name="ce2" office:value-type="string">
            <text:p>Perdite Mano Rossa</text:p>
          </table:table-cell>
          <table:table-cell table:style-name="ce2" office:value-type="string">
            <text:p>Perdite Centauri</text:p>
          </table:table-cell>
          <table:table-cell table:style-name="ce2" office:value-type="string">
            <text:p>Effetto</text:p>
          </table:table-cell>
          <table:table-cell table:style-name="ce2" office:value-type="string">
            <text:p>Trigger</text:p>
          </table:table-cell>
        </table:table-row>
        <table:table-row>
          <table:table-cell office:value-type="string">
            <text:p>Innesco (catene rotte / capi liberati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Inizio rivolta</text:p>
          </table:table-cell>
          <table:table-cell office:value-type="string">
            <text:p>PG sabotaggio o evento naturale</text:p>
          </table:table-cell>
        </table:table-row>
        <table:table-row>
          <table:table-cell office:value-type="string">
            <text:p>Battaglia (2-4 ore)</text:p>
          </table:table-cell>
          <table:table-cell office:value-type="string">
            <text:p>−180</text:p>
          </table:table-cell>
          <table:table-cell office:value-type="string">
            <text:p>−280</text:p>
          </table:table-cell>
          <table:table-cell office:value-type="string">
            <text:p>Combattimento furibondo</text:p>
          </table:table-cell>
          <table:table-cell office:value-type="string">
            <text:p>Automatico dopo innesco</text:p>
          </table:table-cell>
        </table:table-row>
        <table:table-row>
          <table:table-cell office:value-type="string">
            <text:p>Fuga sopravvissuti</text:p>
          </table:table-cell>
          <table:table-cell office:value-type="float" office:value="0">
            <text:p>0</text:p>
          </table:table-cell>
          <table:table-cell office:value-type="string">
            <text:p>−120 fuggono liberi</text:p>
          </table:table-cell>
          <table:table-cell office:value-type="string">
            <text:p>+1 giorno riorganizz.</text:p>
          </table:table-cell>
          <table:table-cell office:value-type="string">
            <text:p>Fine battaglia</text:p>
          </table:table-cell>
        </table:table-row>
        <table:table-row>
          <table:table-cell table:style-name="ce2" office:value-type="string">
            <text:p>TOTALE RIVOLTA CENTAURI</text:p>
          </table:table-cell>
          <table:table-cell table:style-name="ce2" office:value-type="string">
            <text:p>−180 MR</text:p>
          </table:table-cell>
          <table:table-cell table:style-name="ce2" office:value-type="string">
            <text:p>−400 non più disponibili</text:p>
          </table:table-cell>
          <table:table-cell table:style-name="ce2" office:value-type="string">
            <text:p>+2 giorni clock</text:p>
          </table:table-cell>
          <table:table-cell/>
        </table:table-row>
        <table:table-row>
          <table:table-cell office:value-type="string">
            <text:p>BONUS: centauri fuggiti → Rethmar con info</text:p>
          </table:table-cell>
          <table:table-cell office:value-type="string">
            <text:p>Potenziale vantaggio PG</text:p>
          </table:table-cell>
          <table:table-cell/>
          <table:table-cell/>
          <table:table-cell office:value-type="string">
            <text:p>DM discrezione</text:p>
          </table:table-cell>
        </table:table-row>
        <table:table-row>
          <table:table-cell/>
        </table:table-row>
        <table:table-row>
          <table:table-cell table:style-name="ce2" office:value-type="string">
            <text:p>LOXO (40 schiavi — Elefanti da Guerra GS 10)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Effetto sulla marcia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Rallentamento colonna (bisogni logistici)</text:p>
          </table:table-cell>
          <table:table-cell office:value-type="string">
            <text:p>−5% velocità</text:p>
          </table:table-cell>
          <table:table-cell/>
          <table:table-cell/>
          <table:table-cell/>
        </table:table-row>
        <table:table-row>
          <table:table-cell office:value-type="string">
            <text:p>Consumo cibo (4-5× un hobgoblin)</text:p>
          </table:table-cell>
          <table:table-cell office:value-type="string">
            <text:p>Pressione logistica elevata</text:p>
          </table:table-cell>
          <table:table-cell/>
          <table:table-cell/>
          <table:table-cell/>
        </table:table-row>
        <table:table-row>
          <table:table-cell office:value-type="string">
            <text:p>Giorni aggiuntivi di marcia</text:p>
          </table:table-cell>
          <table:table-cell office:value-type="string">
            <text:p>+0.5-1 giorno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ase Rivolta</text:p>
          </table:table-cell>
          <table:table-cell table:style-name="ce2" office:value-type="string">
            <text:p>Perdite Mano Rossa</text:p>
          </table:table-cell>
          <table:table-cell table:style-name="ce2" office:value-type="string">
            <text:p>Perdite Loxo</text:p>
          </table:table-cell>
          <table:table-cell table:style-name="ce2" office:value-type="string">
            <text:p>Effetto</text:p>
          </table:table-cell>
          <table:table-cell table:style-name="ce2" office:value-type="string">
            <text:p>Trigger</text:p>
          </table:table-cell>
        </table:table-row>
        <table:table-row>
          <table:table-cell office:value-type="string">
            <text:p>Scatenamento (controllo magico distrutto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erserk</text:p>
          </table:table-cell>
          <table:table-cell office:value-type="string">
            <text:p>PG distruggono controlli o 3° atto crudeltà</text:p>
          </table:table-cell>
        </table:table-row>
        <table:table-row>
          <table:table-cell office:value-type="string">
            <text:p>Stampede (1-2 ore)</text:p>
          </table:table-cell>
          <table:table-cell office:value-type="string">
            <text:p>−120</text:p>
          </table:table-cell>
          <table:table-cell office:value-type="string">
            <text:p>−15</text:p>
          </table:table-cell>
          <table:table-cell office:value-type="string">
            <text:p>Terrore + danni</text:p>
          </table:table-cell>
          <table:table-cell office:value-type="string">
            <text:p>Automatico</text:p>
          </table:table-cell>
        </table:table-row>
        <table:table-row>
          <table:table-cell office:value-type="string">
            <text:p>Contenimento residuo</text:p>
          </table:table-cell>
          <table:table-cell office:value-type="float" office:value="0">
            <text:p>0</text:p>
          </table:table-cell>
          <table:table-cell office:value-type="string">
            <text:p>25 ri-domati</text:p>
          </table:table-cell>
          <table:table-cell office:value-type="string">
            <text:p>Solo 25 rimasti</text:p>
          </table:table-cell>
          <table:table-cell office:value-type="string">
            <text:p>War Adept + Sciamani</text:p>
          </table:table-cell>
        </table:table-row>
        <table:table-row>
          <table:table-cell table:style-name="ce2" office:value-type="string">
            <text:p>TOTALE RIVOLTA LOXO</text:p>
          </table:table-cell>
          <table:table-cell table:style-name="ce2" office:value-type="string">
            <text:p>−120 MR</text:p>
          </table:table-cell>
          <table:table-cell table:style-name="ce2" office:value-type="string">
            <text:p>25 residui (ridotta efficacia)</text:p>
          </table:table-cell>
          <table:table-cell table:style-name="ce2" office:value-type="string">
            <text:p>+1 giorno clock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IMPATTO COMBINATO ENTRAMBE LE RIVOLT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Perdita totale Mano Rossa</text:p>
          </table:table-cell>
          <table:table-cell office:value-type="string">
            <text:p>−300</text:p>
          </table:table-cell>
          <table:table-cell/>
          <table:table-cell/>
          <table:table-cell office:value-type="string">
            <text:p>Centauri + Loxo</text:p>
          </table:table-cell>
        </table:table-row>
        <table:table-row>
          <table:table-cell office:value-type="string">
            <text:p>Giorni aggiuntivi clock</text:p>
          </table:table-cell>
          <table:table-cell office:value-type="float" office:value="3">
            <text:p>+3</text:p>
          </table:table-cell>
          <table:table-cell/>
          <table:table-cell/>
          <table:table-cell office:value-type="string">
            <text:p>Entrambe le rivolte</text:p>
          </table:table-cell>
        </table:table-row>
        <table:table-row>
          <table:table-cell office:value-type="string">
            <text:p>Forza cavalcature schiavizzate rimasta</text:p>
          </table:table-cell>
          <table:table-cell office:value-type="string">
            <text:p>25 loxo</text:p>
          </table:table-cell>
          <table:table-cell office:value-type="string">
            <text:p>0 centauri</text:p>
          </table:table-cell>
          <table:table-cell/>
          <table:table-cell office:value-type="string">
            <text:p>Impatto su Rethmar ridotto</text:p>
          </table:table-cell>
        </table:table-row>
      </table:table>
    </office:spreadsheet>
  </office:body>
</office:document-content>
</file>